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ROM node:18-alpine3.17 as build</text:p>
      <text:p text:style-name="Standard"/>
      <text:p text:style-name="Standard">WORKDIR /app</text:p>
      <text:p text:style-name="Standard">COPY . /app</text:p>
      <text:p text:style-name="Standard"/>
      <text:p text:style-name="Standard">RUN npm install</text:p>
      <text:p text:style-name="Standard">RUN npm run build</text:p>
      <text:p text:style-name="Standard"/>
      <text:p text:style-name="Standard">FROM ubuntu</text:p>
      <text:p text:style-name="Standard">RUN apt-get update</text:p>
      <text:p text:style-name="Standard">RUN apt-get install nginx -y</text:p>
      <text:p text:style-name="Standard">COPY --from=build /app/dist /var/www/html/</text:p>
      <text:p text:style-name="Standard">EXPOSE 80</text:p>
      <text:p text:style-name="Standard">CMD ["nginx","-g","daemon off;"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4T15:53:03.062396899</meta:creation-date>
    <dc:date>2026-05-14T15:53:41.115145542</dc:date>
    <meta:editing-duration>PT38S</meta:editing-duration>
    <meta:editing-cycles>1</meta:editing-cycles>
    <meta:document-statistic meta:table-count="0" meta:image-count="0" meta:object-count="0" meta:page-count="1" meta:paragraph-count="11" meta:word-count="36" meta:character-count="227" meta:non-whitespace-character-count="203"/>
    <meta:generator>LibreOffice/24.2.7.2$Linux_X86_64 LibreOffice_project/420$Build-2</meta:generator>
  </office:meta>
</office:document-meta>
</file>